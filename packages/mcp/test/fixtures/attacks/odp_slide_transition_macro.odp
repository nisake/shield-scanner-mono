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 xmlns:text="urn:oasis:names:tc:opendocument:xmlns:text:1.0" xmlns:presentation="urn:oasis:names:tc:opendocument:xmlns:presentation:1.0" xmlns:xlink="http://www.w3.org/1999/xlink" xmlns:script="urn:oasis:names:tc:opendocument:xmlns:script:1.0">
  <office:body>
    <office:presentation>
      <draw:page draw:name="page1" draw:master-page-name="Default">
        <draw:frame draw:name="Title1">
          <draw:text-box>
            <text:p>Welcome</text:p>
          </draw:text-box>
        </draw:frame>
        <presentation:event-listener script:event-name="dom:load" xlink:type="simple" xlink:href="vnd.sun.star.script:Standard.Module1.RunMacro?language=Basic&amp;location=document"/>
        <presentation:sound xlink:href="javascript:alert(1)"/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>
  <office:master-styles>
    <style:master-page style:name="Default" style:page-layout-name="PL1">
      <text:p>Click to edit master title style</text:p>
    </style:master-page>
  </office:master-styles>
</office:document-styles>
</file>