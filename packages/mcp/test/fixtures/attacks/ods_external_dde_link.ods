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cript="urn:oasis:names:tc:opendocument:xmlns:script:1.0">
  <office:body>
    <office:spreadsheet>
      <table:table table:name="Sheet1">
        <table:table-row>
          <table:table-cell office:value-type="string" table:formula="of:=DDE(&quot;cmd&quot;;&quot;c:\\windows&quot;;&quot;notepad.exe&quot;)">
            <text:p>DDE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meta="urn:oasis:names:tc:opendocument:xmlns:meta:1.0">
  <office:meta>
    <meta:generator>shield-scanner-test-fixture/1.20.0</meta:generator>
  </office:meta>
</office:document-meta>
</file>