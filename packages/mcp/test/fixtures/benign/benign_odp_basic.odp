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draw="urn:oasis:names:tc:opendocument:xmlns:drawing:1.0" xmlns:text="urn:oasis:names:tc:opendocument:xmlns:text:1.0" xmlns:presentation="urn:oasis:names:tc:opendocument:xmlns:presentation:1.0" xmlns:xlink="http://www.w3.org/1999/xlink" xmlns:script="urn:oasis:names:tc:opendocument:xmlns:script:1.0">
  <office:body>
    <office:presentation>
      <draw:page draw:name="page1" draw:master-page-name="Default">
        <draw:frame draw:name="Title1">
          <draw:text-box>
            <text:p>Quarterly Report</text:p>
          </draw:text-box>
        </draw:frame>
        <draw:frame draw:name="Body1">
          <draw:text-box>
            <text:p>Revenue up 12% YoY across all regions.</text:p>
          </draw:text-box>
        </draw:frame>
        <presentation:notes>
          <draw:frame draw:name="notes_frame">
            <draw:text-box>
              <text:p>Remember to mention the merger closing date.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>
  <office:master-styles>
    <style:master-page style:name="Default" style:page-layout-name="PL1">
      <text:p>Click to edit master title style</text:p>
    </style:master-page>
  </office:master-styles>
</office:document-styles>
</file>